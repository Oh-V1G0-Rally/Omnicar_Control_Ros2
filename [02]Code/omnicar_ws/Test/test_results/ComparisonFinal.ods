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3.7417in"/>
    </style:style>
    <style:style style:name="co4" style:family="table-column">
      <style:table-column-properties fo:break-before="auto" style:column-width="3.76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PF_2026-04-29_INFIN_MAP_LINEAR_V01_04</text:p>
          </table:table-cell>
          <table:table-cell office:value-type="string" calcext:value-type="string">
            <text:p>PF_2026-04-29_INFIN_MAP_LINEAR_V01_05</text:p>
          </table:table-cell>
          <table:table-cell office:value-type="string" calcext:value-type="string">
            <text:p>PF_2026-05-11_INFIN_MAP_MPCC_V01_05</text:p>
          </table:table-cell>
          <table:table-cell office:value-type="string" calcext:value-type="string">
            <text:p>PF_2026-05-11_INFIN_MAP_MPCC_V01_06</text:p>
          </table:table-cell>
        </table:table-row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PF_2026-04-29_INFIN_MAP_LINEAR_V01_04</text:p>
          </table:table-cell>
          <table:table-cell office:value-type="string" calcext:value-type="string">
            <text:p>PF_2026-04-29_INFIN_MAP_LINEAR_V01_05</text:p>
          </table:table-cell>
          <table:table-cell office:value-type="string" calcext:value-type="string">
            <text:p>PF_2026-05-11_INFIN_MAP_MPCC_V01_05</text:p>
          </table:table-cell>
          <table:table-cell office:value-type="string" calcext:value-type="string">
            <text:p>PF_2026-05-11_INFIN_MAP_MPCC_V01_0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table:style-name="ce1" office:value-type="string" calcext:value-type="string">
            <text:p>2026-04-29</text:p>
          </table:table-cell>
          <table:table-cell table:number-columns-repeated="2" table:style-name="ce1" office:value-type="string" calcext:value-type="string">
            <text:p>2026-05-11</text:p>
          </table:table-cell>
        </table:table-row>
        <table:table-row table:style-name="ro1">
          <table:table-cell office:value-type="string" calcext:value-type="string">
            <text:p>run_ind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g_name</text:p>
          </table:table-cell>
          <table:table-cell office:value-type="string" calcext:value-type="string">
            <text:p>PF_2026-04-29_INFIN_MAP_LINEAR_V01_04</text:p>
          </table:table-cell>
          <table:table-cell office:value-type="string" calcext:value-type="string">
            <text:p>PF_2026-04-29_INFIN_MAP_LINEAR_V01_05</text:p>
          </table:table-cell>
          <table:table-cell office:value-type="string" calcext:value-type="string">
            <text:p>PF_2026-05-11_INFIN_MAP_MPCC_V01_05</text:p>
          </table:table-cell>
          <table:table-cell office:value-type="string" calcext:value-type="string">
            <text:p>PF_2026-05-11_INFIN_MAP_MPCC_V01_06</text:p>
          </table:table-cell>
        </table:table-row>
        <table:table-row table:style-name="ro1">
          <table:table-cell office:value-type="string" calcext:value-type="string">
            <text:p>path_name</text:p>
          </table:table-cell>
          <table:table-cell table:number-columns-repeated="4" office:value-type="string" calcext:value-type="string">
            <text:p>INFI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4"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map_name</text:p>
          </table:table-cell>
          <table:table-cell table:number-columns-repeated="4" office:value-type="string" calcext:value-type="string">
            <text:p>FEUP_180x120</text:p>
          </table:table-cell>
        </table:table-row>
        <table:table-row table:style-name="ro1">
          <table:table-cell office:value-type="string" calcext:value-type="string">
            <text:p>controller_name</text:p>
          </table:table-cell>
          <table:table-cell table:number-columns-repeated="2" office:value-type="string" calcext:value-type="string">
            <text:p>PONLY</text:p>
          </table:table-cell>
          <table:table-cell table:number-columns-repeated="2" office:value-type="string" calcext:value-type="string">
            <text:p>MPCC</text:p>
          </table:table-cell>
        </table:table-row>
        <table:table-row table:style-name="ro1">
          <table:table-cell office:value-type="string" calcext:value-type="string">
            <text:p>controller_version</text:p>
          </table:table-cell>
          <table:table-cell table:number-columns-repeated="4" office:value-type="string" calcext:value-type="string">
            <text:p>V01</text:p>
          </table:table-cell>
        </table:table-row>
        <table:table-row table:style-name="ro1">
          <table:table-cell office:value-type="string" calcext:value-type="string">
            <text:p>controller_mode</text:p>
          </table:table-cell>
          <table:table-cell table:number-columns-repeated="2" office:value-type="string" calcext:value-type="string">
            <text:p>linear_segment</text:p>
          </table:table-cell>
          <table:table-cell table:number-columns-repeated="2" office:value-type="string" calcext:value-type="string">
            <text:p>nonlinear_mpcc</text:p>
          </table:table-cell>
        </table:table-row>
        <table:table-row table:style-name="ro1">
          <table:table-cell office:value-type="string" calcext:value-type="string">
            <text:p>heading_mode</text:p>
          </table:table-cell>
          <table:table-cell table:number-columns-repeated="4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esired_speed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_gamma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gamma_dot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ax_gamma_dot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inear_k_alo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_k_later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_projection_lookahe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_projection_search_behind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_projection_search_ahead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_rate_hz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bug_publish_rate_hz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ry_tolerance_xy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_is_closed</text:p>
          </table:table-cell>
          <table:table-cell table:number-columns-repeated="4"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op_at_end</text:p>
          </table:table-cell>
          <table:table-cell table:number-columns-repeated="4"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p_x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_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_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_y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_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_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_yaw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_ya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_ya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linear_x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linear_y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ngular_z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x_integral_x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integral_y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integral_yaw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ion_horiz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ediction_dt</text:p>
          </table:table-cell>
          <table:table-cell table:number-columns-repeated="2"/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q_contou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_la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_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q_terminal_contou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_terminal_la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_progress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r_vx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r_vy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r_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_gamma_dot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_delta_vx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delta_v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delta_w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_delta_gamma_dot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ax_accel_x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ax_accel_y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ax_accel_w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_gamma_acce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x_sample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y_sample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_sample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mma_dot_sampl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ration_s</text:p>
          </table:table-cell>
          <table:table-cell office:value-type="float" office:value="27.3916275501251" calcext:value-type="float">
            <text:p>27.3916275501251</text:p>
          </table:table-cell>
          <table:table-cell office:value-type="float" office:value="22.5803532600403" calcext:value-type="float">
            <text:p>22.5803532600403</text:p>
          </table:table-cell>
          <table:table-cell office:value-type="float" office:value="35.3942847251892" calcext:value-type="float">
            <text:p>35.3942847251892</text:p>
          </table:table-cell>
          <table:table-cell office:value-type="float" office:value="21.5288217067719" calcext:value-type="float">
            <text:p>21.5288217067719</text:p>
          </table:table-cell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853" calcext:value-type="float">
            <text:p>853</text:p>
          </table:table-cell>
          <table:table-cell office:value-type="float" office:value="716" calcext:value-type="float">
            <text:p>716</text:p>
          </table:table-cell>
          <table:table-cell office:value-type="float" office:value="532" calcext:value-type="float">
            <text:p>5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t_mean_s</text:p>
          </table:table-cell>
          <table:table-cell office:value-type="float" office:value="0.032149797594044" calcext:value-type="float">
            <text:p>0.032149797594044</text:p>
          </table:table-cell>
          <table:table-cell office:value-type="float" office:value="0.031580913650406" calcext:value-type="float">
            <text:p>0.031580913650406</text:p>
          </table:table-cell>
          <table:table-cell office:value-type="float" office:value="0.0666559034372678" calcext:value-type="float">
            <text:p>0.066655903437268</text:p>
          </table:table-cell>
          <table:table-cell office:value-type="float" office:value="0.0666526987825754" calcext:value-type="float">
            <text:p>0.066652698782575</text:p>
          </table:table-cell>
        </table:table-row>
        <table:table-row table:style-name="ro1">
          <table:table-cell office:value-type="string" calcext:value-type="string">
            <text:p>path_length_real_m</text:p>
          </table:table-cell>
          <table:table-cell office:value-type="float" office:value="10.7534887075605" calcext:value-type="float">
            <text:p>10.7534887075605</text:p>
          </table:table-cell>
          <table:table-cell office:value-type="float" office:value="11.6236735837458" calcext:value-type="float">
            <text:p>11.6236735837458</text:p>
          </table:table-cell>
          <table:table-cell office:value-type="float" office:value="9.43906425045968" calcext:value-type="float">
            <text:p>9.43906425045968</text:p>
          </table:table-cell>
          <table:table-cell office:value-type="float" office:value="6.28361300996908" calcext:value-type="float">
            <text:p>6.28361300996908</text:p>
          </table:table-cell>
        </table:table-row>
        <table:table-row table:style-name="ro1">
          <table:table-cell office:value-type="string" calcext:value-type="string">
            <text:p>gamma_final_m</text:p>
          </table:table-cell>
          <table:table-cell office:value-type="float" office:value="2.118067573742" calcext:value-type="float">
            <text:p>2.118067573742</text:p>
          </table:table-cell>
          <table:table-cell office:value-type="float" office:value="2.18319519219554" calcext:value-type="float">
            <text:p>2.18319519219554</text:p>
          </table:table-cell>
          <table:table-cell office:value-type="float" office:value="2.26631552945301" calcext:value-type="float">
            <text:p>2.26631552945301</text:p>
          </table:table-cell>
          <table:table-cell office:value-type="float" office:value="4.44275340931622" calcext:value-type="float">
            <text:p>4.44275340931622</text:p>
          </table:table-cell>
        </table:table-row>
        <table:table-row table:style-name="ro1">
          <table:table-cell office:value-type="string" calcext:value-type="string">
            <text:p>gamma_progress_ratio</text:p>
          </table:table-cell>
          <table:table-cell office:value-type="float" office:value="0.465034403274131" calcext:value-type="float">
            <text:p>0.465034403274131</text:p>
          </table:table-cell>
          <table:table-cell office:value-type="float" office:value="0.479333561412272" calcext:value-type="float">
            <text:p>0.479333561412272</text:p>
          </table:table-cell>
          <table:table-cell office:value-type="float" office:value="0.497583128572297" calcext:value-type="float">
            <text:p>0.497583128572297</text:p>
          </table:table-cell>
          <table:table-cell office:value-type="float" office:value="0.975433081648764" calcext:value-type="float">
            <text:p>0.975433081648764</text:p>
          </table:table-cell>
        </table:table-row>
        <table:table-row table:style-name="ro1">
          <table:table-cell office:value-type="string" calcext:value-type="string">
            <text:p>rmse_x_m</text:p>
          </table:table-cell>
          <table:table-cell office:value-type="float" office:value="0.027019223287875" calcext:value-type="float">
            <text:p>0.027019223287875</text:p>
          </table:table-cell>
          <table:table-cell office:value-type="float" office:value="0.039585620087277" calcext:value-type="float">
            <text:p>0.039585620087277</text:p>
          </table:table-cell>
          <table:table-cell office:value-type="float" office:value="0.0368030073150844" calcext:value-type="float">
            <text:p>0.036803007315084</text:p>
          </table:table-cell>
          <table:table-cell office:value-type="float" office:value="0.0677382382307403" calcext:value-type="float">
            <text:p>0.06773823823074</text:p>
          </table:table-cell>
        </table:table-row>
        <table:table-row table:style-name="ro1">
          <table:table-cell office:value-type="string" calcext:value-type="string">
            <text:p>rmse_y_m</text:p>
          </table:table-cell>
          <table:table-cell office:value-type="float" office:value="0.022847764583339" calcext:value-type="float">
            <text:p>0.022847764583339</text:p>
          </table:table-cell>
          <table:table-cell office:value-type="float" office:value="0.025242242189579" calcext:value-type="float">
            <text:p>0.025242242189579</text:p>
          </table:table-cell>
          <table:table-cell office:value-type="float" office:value="0.0583008267963467" calcext:value-type="float">
            <text:p>0.058300826796347</text:p>
          </table:table-cell>
          <table:table-cell office:value-type="float" office:value="0.0933685877506901" calcext:value-type="float">
            <text:p>0.09336858775069</text:p>
          </table:table-cell>
        </table:table-row>
        <table:table-row table:style-name="ro1">
          <table:table-cell office:value-type="string" calcext:value-type="string">
            <text:p>rmse_tracking_error_norm_m</text:p>
          </table:table-cell>
          <table:table-cell office:value-type="float" office:value="0.035384442535325" calcext:value-type="float">
            <text:p>0.035384442535325</text:p>
          </table:table-cell>
          <table:table-cell office:value-type="float" office:value="0.046948824356437" calcext:value-type="float">
            <text:p>0.046948824356437</text:p>
          </table:table-cell>
          <table:table-cell office:value-type="float" office:value="0.0689452518493607" calcext:value-type="float">
            <text:p>0.068945251849361</text:p>
          </table:table-cell>
          <table:table-cell office:value-type="float" office:value="0.115352338932346" calcext:value-type="float">
            <text:p>0.115352338932346</text:p>
          </table:table-cell>
        </table:table-row>
        <table:table-row table:style-name="ro1">
          <table:table-cell office:value-type="string" calcext:value-type="string">
            <text:p>mean_tracking_error_norm_m</text:p>
          </table:table-cell>
          <table:table-cell office:value-type="float" office:value="0.029925113985191" calcext:value-type="float">
            <text:p>0.029925113985191</text:p>
          </table:table-cell>
          <table:table-cell office:value-type="float" office:value="0.039190536046094" calcext:value-type="float">
            <text:p>0.039190536046094</text:p>
          </table:table-cell>
          <table:table-cell office:value-type="float" office:value="0.061393860437385" calcext:value-type="float">
            <text:p>0.061393860437385</text:p>
          </table:table-cell>
          <table:table-cell office:value-type="float" office:value="0.108465624244311" calcext:value-type="float">
            <text:p>0.108465624244311</text:p>
          </table:table-cell>
        </table:table-row>
        <table:table-row table:style-name="ro1">
          <table:table-cell office:value-type="string" calcext:value-type="string">
            <text:p>max_tracking_error_norm_m</text:p>
          </table:table-cell>
          <table:table-cell office:value-type="float" office:value="0.077168519928633" calcext:value-type="float">
            <text:p>0.077168519928633</text:p>
          </table:table-cell>
          <table:table-cell office:value-type="float" office:value="0.116612883940622" calcext:value-type="float">
            <text:p>0.116612883940622</text:p>
          </table:table-cell>
          <table:table-cell office:value-type="float" office:value="0.146667323703086" calcext:value-type="float">
            <text:p>0.146667323703086</text:p>
          </table:table-cell>
          <table:table-cell office:value-type="float" office:value="0.210188501995338" calcext:value-type="float">
            <text:p>0.210188501995338</text:p>
          </table:table-cell>
        </table:table-row>
        <table:table-row table:style-name="ro1">
          <table:table-cell office:value-type="string" calcext:value-type="string">
            <text:p>rmse_yaw_rad</text:p>
          </table:table-cell>
          <table:table-cell office:value-type="float" office:value="0.018685031273159" calcext:value-type="float">
            <text:p>0.018685031273159</text:p>
          </table:table-cell>
          <table:table-cell office:value-type="float" office:value="0.03235259834958" calcext:value-type="float">
            <text:p>0.03235259834958</text:p>
          </table:table-cell>
          <table:table-cell office:value-type="float" office:value="0.0138965370520719" calcext:value-type="float">
            <text:p>0.013896537052072</text:p>
          </table:table-cell>
          <table:table-cell office:value-type="float" office:value="0.0294260962363479" calcext:value-type="float">
            <text:p>0.029426096236348</text:p>
          </table:table-cell>
        </table:table-row>
        <table:table-row table:style-name="ro1">
          <table:table-cell office:value-type="string" calcext:value-type="string">
            <text:p>rmse_error_along_m</text:p>
          </table:table-cell>
          <table:table-cell office:value-type="float" office:value="0.000507430707725" calcext:value-type="float">
            <text:p>0.000507430707725</text:p>
          </table:table-cell>
          <table:table-cell office:value-type="float" office:value="0.00092082712606" calcext:value-type="float">
            <text:p>0.00092082712606</text:p>
          </table:table-cell>
          <table:table-cell office:value-type="float" office:value="0.0667873350847524" calcext:value-type="float">
            <text:p>0.066787335084753</text:p>
          </table:table-cell>
          <table:table-cell office:value-type="float" office:value="0.110430124547478" calcext:value-type="float">
            <text:p>0.110430124547478</text:p>
          </table:table-cell>
        </table:table-row>
        <table:table-row table:style-name="ro1">
          <table:table-cell office:value-type="string" calcext:value-type="string">
            <text:p>mean_abs_error_along_m</text:p>
          </table:table-cell>
          <table:table-cell office:value-type="float" office:value="0.000095619822069146" calcext:value-type="float">
            <text:p>9.5619822069146E-05</text:p>
          </table:table-cell>
          <table:table-cell office:value-type="float" office:value="0.000195510513929" calcext:value-type="float">
            <text:p>0.000195510513929</text:p>
          </table:table-cell>
          <table:table-cell office:value-type="float" office:value="0.0589154236450955" calcext:value-type="float">
            <text:p>0.058915423645096</text:p>
          </table:table-cell>
          <table:table-cell office:value-type="float" office:value="0.103833826694141" calcext:value-type="float">
            <text:p>0.103833826694141</text:p>
          </table:table-cell>
        </table:table-row>
        <table:table-row table:style-name="ro1">
          <table:table-cell office:value-type="string" calcext:value-type="string">
            <text:p>max_abs_error_along_m</text:p>
          </table:table-cell>
          <table:table-cell office:value-type="float" office:value="0.005689367986314" calcext:value-type="float">
            <text:p>0.005689367986314</text:p>
          </table:table-cell>
          <table:table-cell office:value-type="float" office:value="0.010355322067953" calcext:value-type="float">
            <text:p>0.010355322067953</text:p>
          </table:table-cell>
          <table:table-cell office:value-type="float" office:value="0.145507858244051" calcext:value-type="float">
            <text:p>0.145507858244051</text:p>
          </table:table-cell>
          <table:table-cell office:value-type="float" office:value="0.203183024328758" calcext:value-type="float">
            <text:p>0.203183024328758</text:p>
          </table:table-cell>
        </table:table-row>
        <table:table-row table:style-name="ro1">
          <table:table-cell office:value-type="string" calcext:value-type="string">
            <text:p>iae_error_along</text:p>
          </table:table-cell>
          <table:table-cell office:value-type="float" office:value="0.002703068208066" calcext:value-type="float">
            <text:p>0.002703068208066</text:p>
          </table:table-cell>
          <table:table-cell office:value-type="float" office:value="0.004375942198058" calcext:value-type="float">
            <text:p>0.004375942198058</text:p>
          </table:table-cell>
          <table:table-cell office:value-type="float" office:value="2.08266858977992" calcext:value-type="float">
            <text:p>2.08266858977992</text:p>
          </table:table-cell>
          <table:table-cell office:value-type="float" office:value="2.23510808447781" calcext:value-type="float">
            <text:p>2.23510808447781</text:p>
          </table:table-cell>
        </table:table-row>
        <table:table-row table:style-name="ro1">
          <table:table-cell office:value-type="string" calcext:value-type="string">
            <text:p>max_abs_error_yaw_rad</text:p>
          </table:table-cell>
          <table:table-cell office:value-type="float" office:value="0.046433798906652" calcext:value-type="float">
            <text:p>0.046433798906652</text:p>
          </table:table-cell>
          <table:table-cell office:value-type="float" office:value="0.074490036548856" calcext:value-type="float">
            <text:p>0.074490036548856</text:p>
          </table:table-cell>
          <table:table-cell office:value-type="float" office:value="0.0473375556558025" calcext:value-type="float">
            <text:p>0.047337555655803</text:p>
          </table:table-cell>
          <table:table-cell office:value-type="float" office:value="0.0710033725651229" calcext:value-type="float">
            <text:p>0.071003372565123</text:p>
          </table:table-cell>
        </table:table-row>
        <table:table-row table:style-name="ro1">
          <table:table-cell office:value-type="string" calcext:value-type="string">
            <text:p>sat_vx_ratio</text:p>
          </table:table-cell>
          <table:table-cell office:value-type="float" office:value="0.066822977725674" calcext:value-type="float">
            <text:p>0.066822977725674</text:p>
          </table:table-cell>
          <table:table-cell office:value-type="float" office:value="0.230446927374302" calcext:value-type="float">
            <text:p>0.230446927374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_vy_ratio</text:p>
          </table:table-cell>
          <table:table-cell office:value-type="float" office:value="0.096131301289566" calcext:value-type="float">
            <text:p>0.096131301289566</text:p>
          </table:table-cell>
          <table:table-cell office:value-type="float" office:value="0.195530726256983" calcext:value-type="float">
            <text:p>0.19553072625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_w_rat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_folder</text:p>
          </table:table-cell>
          <table:table-cell office:value-type="string" calcext:value-type="string">
            <text:p>/home/c2sr/Omnicar_Control_Ros2/[02]Code/omnicar_ws/Test/test_results/PF_2026-04-29_INFIN_MAP_LINEAR_V01_R08</text:p>
          </table:table-cell>
          <table:table-cell office:value-type="string" calcext:value-type="string">
            <text:p>/home/c2sr/Omnicar_Control_Ros2/[02]Code/omnicar_ws/Test/test_results/PF_2026-04-29_INFIN_MAP_LINEAR_V01_R10</text:p>
          </table:table-cell>
          <table:table-cell office:value-type="string" calcext:value-type="string">
            <text:p>/home/c2sr/Omnicar_Control_Ros2/[02]Code/omnicar_ws/Test/test_results/PF_2026-05-11_INFIN_MAP_MPCC_V01_R05</text:p>
          </table:table-cell>
          <table:table-cell office:value-type="string" calcext:value-type="string">
            <text:p>/home/c2sr/Omnicar_Control_Ros2/[02]Code/omnicar_ws/Test/test_results/PF_2026-05-11_INFIN_MAP_MPCC_V01_R06</text:p>
          </table:table-cell>
        </table:table-row>
        <table:table-row table:style-name="ro1">
          <table:table-cell office:value-type="string" calcext:value-type="string">
            <text:p>analysis_timestamp</text:p>
          </table:table-cell>
          <table:table-cell table:style-name="ce1" office:value-type="string" calcext:value-type="string">
            <text:p>2026-04-29T16:13:48</text:p>
          </table:table-cell>
          <table:table-cell table:style-name="ce1" office:value-type="string" calcext:value-type="string">
            <text:p>2026-04-29T16:21:17</text:p>
          </table:table-cell>
          <table:table-cell table:style-name="ce1" office:value-type="string" calcext:value-type="string">
            <text:p>2026-05-11T16:23:14</text:p>
          </table:table-cell>
          <table:table-cell table:style-name="ce1" office:value-type="string" calcext:value-type="string">
            <text:p>2026-05-11T17:05:00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19T17:37:36.218215364</meta:creation-date>
    <dc:date>2026-05-19T17:41:21.913960896</dc:date>
    <meta:editing-duration>PT3M45S</meta:editing-duration>
    <meta:editing-cycles>1</meta:editing-cycles>
    <meta:document-statistic meta:table-count="1" meta:cell-count="348" meta:object-count="0"/>
    <meta:generator>LibreOffice/6.4.7.2$Linux_X86_64 LibreOffice_project/40$Build-2</meta:generator>
  </office:meta>
</office:document-meta>
</file>